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onst PrivacyPolicy = () =&gt; {</text:p>
      <text:p text:style-name="P1"><text:s text:c="2"/>return (</text:p>
      <text:p text:style-name="P1"><text:s text:c="4"/>&lt;div className="min-h-full w-full bg-background text-foreground"&gt;</text:p>
      <text:p text:style-name="P1"><text:s text:c="6"/>&lt;div className="mx-auto max-w-3xl px-6 py-16"&gt;</text:p>
      <text:p text:style-name="P1"><text:s text:c="8"/>&lt;h1 className="text-3xl font-bold tracking-tight md:text-4xl"&gt;</text:p>
      <text:p text:style-name="P1"><text:s text:c="10"/>Privacy Policy</text:p>
      <text:p text:style-name="P1"><text:s text:c="8"/>&lt;/h1&gt;</text:p>
      <text:p text:style-name="P1"><text:s text:c="8"/>&lt;p className="mt-2 text-sm text-muted-foreground"&gt;</text:p>
      <text:p text:style-name="P1"><text:s text:c="10"/>App: My Car Papers &amp;middot; Developer: Motiscriber</text:p>
      <text:p text:style-name="P1"><text:s text:c="8"/>&lt;/p&gt;</text:p>
      <text:p text:style-name="P1"><text:s text:c="8"/>&lt;p className="mt-1 text-sm text-muted-foreground"&gt;</text:p>
      <text:p text:style-name="P1"><text:s text:c="10"/>Effective date: July 18, 2026</text:p>
      <text:p text:style-name="P1"><text:s text:c="8"/>&lt;/p&gt;</text:p>
      <text:p text:style-name="P1"/>
      <text:p text:style-name="P1"><text:s text:c="8"/>&lt;div className="mt-10 space-y-10"&gt;</text:p>
      <text:p text:style-name="P1"><text:s text:c="10"/>&lt;section&gt;</text:p>
      <text:p text:style-name="P1"><text:s text:c="12"/>&lt;h2 className="text-xl font-semibold"&gt;Introduction&lt;/h2&gt;</text:p>
      <text:p text:style-name="P1"><text:s text:c="12"/>&lt;p className="mt-3 leading-relaxed text-muted-foreground"&gt;</text:p>
      <text:p text:style-name="P1"><text:s text:c="14"/>Motiscriber ("we", "us", or "our") operates the My Car Papers</text:p>
      <text:p text:style-name="P1"><text:s text:c="14"/>Android application (the "App"). This Privacy Policy explains</text:p>
      <text:p text:style-name="P1"><text:s text:c="14"/>how we handle information when you use the App. By using My</text:p>
      <text:p text:style-name="P1"><text:s text:c="14"/>Car Papers, you agree to the practices described in this</text:p>
      <text:p text:style-name="P1"><text:s text:c="14"/>policy.</text:p>
      <text:p text:style-name="P1"><text:s text:c="12"/>&lt;/p&gt;</text:p>
      <text:p text:style-name="P1"><text:s text:c="10"/>&lt;/section&gt;</text:p>
      <text:p text:style-name="P1"/>
      <text:p text:style-name="P1"><text:s text:c="10"/>&lt;section&gt;</text:p>
      <text:p text:style-name="P1"><text:s text:c="12"/>&lt;h2 className="text-xl font-semibold"&gt;Information We Collect&lt;/h2&gt;</text:p>
      <text:p text:style-name="P1"><text:s text:c="12"/>&lt;p className="mt-3 leading-relaxed text-muted-foreground"&gt;</text:p>
      <text:p text:style-name="P1"><text:s text:c="14"/>My Car Papers is designed to help you scan, organize, and store</text:p>
      <text:p text:style-name="P1"><text:s text:c="14"/>your vehicle documents directly on your device. We do not</text:p>
      <text:p text:style-name="P1"><text:s text:c="14"/>collect, transmit, or store your personal information or</text:p>
      <text:p text:style-name="P1"><text:s text:c="14"/>documents on any external server. The App may request the</text:p>
      <text:p text:style-name="P1"><text:s text:c="14"/>following device permissions solely to provide its core</text:p>
      <text:p text:style-name="P1"><text:s text:c="14"/>functionality:</text:p>
      <text:p text:style-name="P1"><text:s text:c="12"/>&lt;/p&gt;</text:p>
      <text:p text:style-name="P1"><text:s text:c="12"/>&lt;ul className="mt-3 list-disc space-y-2 pl-6 leading-relaxed text-muted-foreground"&gt;</text:p>
      <text:p text:style-name="P1"><text:s text:c="14"/>&lt;li&gt;</text:p>
      <text:p text:style-name="P1"><text:s text:c="16"/>&lt;span className="font-medium text-foreground"&gt;Camera:&lt;/span&gt;{" "}</text:p>
      <text:p text:style-name="P1"><text:s text:c="16"/>used to scan or photograph your car documents (e.g.</text:p>
      <text:p text:style-name="P1"><text:s text:c="16"/>registration, insurance, inspection papers).</text:p>
      <text:p text:style-name="P1"><text:s text:c="14"/>&lt;/li&gt;</text:p>
      <text:p text:style-name="P1"><text:s text:c="14"/>&lt;li&gt;</text:p>
      <text:p text:style-name="P1"><text:s text:c="16"/>&lt;span className="font-medium text-foreground"&gt;</text:p>
      <text:p text:style-name="P1"><text:s text:c="18"/>Storage / Photos:</text:p>
      <text:p text:style-name="P1"><text:s text:c="16"/>&lt;/span&gt;{" "}</text:p>
      <text:p text:style-name="P1"><text:s text:c="16"/>used to save scanned documents to, and retrieve them from,</text:p>
      <text:p text:style-name="P1"><text:s text:c="16"/>your device.</text:p>
      <text:p text:style-name="P1"><text:s text:c="14"/>&lt;/li&gt;</text:p>
      <text:p text:style-name="P1"><text:s text:c="12"/>&lt;/ul&gt;</text:p>
      <text:p text:style-name="P1"><text:s text:c="10"/>&lt;/section&gt;</text:p>
      <text:p text:style-name="P1"/>
      <text:p text:style-name="P1"><text:s text:c="10"/>&lt;section&gt;</text:p>
      <text:p text:style-name="P1"><text:s text:c="12"/>&lt;h2 className="text-xl font-semibold"&gt;</text:p>
      <text:p text:style-name="P1"><text:s text:c="14"/>How We Use Permissions</text:p>
      <text:p text:style-name="P1"><text:s text:c="12"/>&lt;/h2&gt;</text:p>
      <text:p text:style-name="P1"><text:s text:c="12"/>&lt;p className="mt-3 leading-relaxed text-muted-foreground"&gt;</text:p>
      <text:p text:style-name="P1"><text:s text:c="14"/>Permissions are used only to enable in-app features you</text:p>
      <text:p text:style-name="P1"><text:s text:c="14"/>actively choose to use, such as scanning a new document or</text:p>
      <text:p text:style-name="P1"><text:s text:c="14"/>viewing previously saved ones. We do not access these</text:p>
      <text:p text:style-name="P1"><text:s text:c="14"/>permissions in the background or for any purpose unrelated to</text:p>
      <text:p text:style-name="P1"><text:s text:c="14"/>the App's core functionality.</text:p>
      <text:p text:style-name="P1"><text:s text:c="12"/>&lt;/p&gt;</text:p>
      <text:p text:style-name="P1"><text:s text:c="10"/>&lt;/section&gt;</text:p>
      <text:p text:style-name="P1"/>
      <text:p text:style-name="P1"><text:s text:c="10"/>&lt;section&gt;</text:p>
      <text:p text:style-name="P1"><text:s text:c="12"/>&lt;h2 className="text-xl font-semibold"&gt;</text:p>
      <text:p text:style-name="P1"><text:s text:c="14"/>Data Storage &amp; Security</text:p>
      <text:p text:style-name="P1"><text:s text:c="12"/>&lt;/h2&gt;</text:p>
      <text:p text:style-name="P1"><text:s text:c="12"/>&lt;p className="mt-3 leading-relaxed text-muted-foreground"&gt;</text:p>
      <text:p text:style-name="P1"><text:s text:c="14"/>All documents and data you create within the App are stored</text:p>
      <text:p text:style-name="P1"><text:s text:c="14"/>locally on your device. We do not operate servers that receive</text:p>
      <text:p text:style-name="P1"><text:s text:c="14"/>or store your documents, and we do not sell or share your data</text:p>
      <text:p text:style-name="P1"><text:s text:c="14"/>with third parties. If you uninstall the App or clear its</text:p>
      <text:p text:style-name="P1"><text:s text:c="14"/>data, your locally stored documents may be permanently</text:p>
      <text:p text:style-name="P1"><text:s text:c="14"/>deleted.</text:p>
      <text:p text:style-name="P1"><text:s text:c="12"/>&lt;/p&gt;</text:p>
      <text:p text:style-name="P1"><text:s text:c="10"/>&lt;/section&gt;</text:p>
      <text:p text:style-name="P1"/>
      <text:p text:style-name="P1"><text:s text:c="10"/>&lt;section&gt;</text:p>
      <text:p text:style-name="P1"><text:s text:c="12"/>&lt;h2 className="text-xl font-semibold"&gt;Third-Party Services&lt;/h2&gt;</text:p>
      <text:p text:style-name="P1"><text:s text:c="12"/>&lt;p className="mt-3 leading-relaxed text-muted-foreground"&gt;</text:p>
      <text:p text:style-name="P1"><text:s text:c="14"/>My Car Papers does not integrate third-party analytics,</text:p>
      <text:p text:style-name="P1"><text:s text:c="14"/>advertising, or tracking services, and does not require account</text:p>
      <text:p text:style-name="P1"><text:s text:c="14"/>creation or login.</text:p>
      <text:p text:style-name="P1"><text:s text:c="12"/>&lt;/p&gt;</text:p>
      <text:p text:style-name="P1"><text:s text:c="10"/>&lt;/section&gt;</text:p>
      <text:p text:style-name="P1"/>
      <text:p text:style-name="P1"><text:s text:c="10"/>&lt;section&gt;</text:p>
      <text:p text:style-name="P1"><text:s text:c="12"/>&lt;h2 className="text-xl font-semibold"&gt;Children's Privacy&lt;/h2&gt;</text:p>
      <text:p text:style-name="P1"><text:s text:c="12"/>&lt;p className="mt-3 leading-relaxed text-muted-foreground"&gt;</text:p>
      <text:p text:style-name="P1"><text:s text:c="14"/>The App is not directed at children under the age of 13, and we</text:p>
      <text:p text:style-name="P1"><text:s text:c="14"/>do not knowingly collect information from children.</text:p>
      <text:p text:style-name="P1"><text:s text:c="12"/>&lt;/p&gt;</text:p>
      <text:p text:style-name="P1"><text:s text:c="10"/>&lt;/section&gt;</text:p>
      <text:p text:style-name="P1"/>
      <text:p text:style-name="P1"><text:s text:c="10"/>&lt;section&gt;</text:p>
      <text:p text:style-name="P1"><text:s text:c="12"/>&lt;h2 className="text-xl font-semibold"&gt;</text:p>
      <text:p text:style-name="P1"><text:s text:c="14"/>Changes to This Policy</text:p>
      <text:p text:style-name="P1"><text:s text:c="12"/>&lt;/h2&gt;</text:p>
      <text:p text:style-name="P1"><text:s text:c="12"/>&lt;p className="mt-3 leading-relaxed text-muted-foreground"&gt;</text:p>
      <text:p text:style-name="P1"><text:s text:c="14"/>We may update this Privacy Policy from time to time. Any</text:p>
      <text:p text:style-name="P1"><text:s text:c="14"/>changes will be reflected on this page with an updated</text:p>
      <text:p text:style-name="P1"><text:s text:c="14"/>effective date.</text:p>
      <text:p text:style-name="P1"><text:s text:c="12"/>&lt;/p&gt;</text:p>
      <text:p text:style-name="P1"><text:s text:c="10"/>&lt;/section&gt;</text:p>
      <text:p text:style-name="P1"/>
      <text:p text:style-name="P1"><text:s text:c="10"/>&lt;section&gt;</text:p>
      <text:p text:style-name="P1"><text:s text:c="12"/>&lt;h2 className="text-xl font-semibold"&gt;Contact Us&lt;/h2&gt;</text:p>
      <text:p text:style-name="P1"><text:s text:c="12"/>&lt;p className="mt-3 leading-relaxed text-muted-foreground"&gt;</text:p>
      <text:p text:style-name="P1"><text:s text:c="14"/>If you have any questions about this Privacy Policy, please</text:p>
      <text:p text:style-name="P1"><text:s text:c="14"/>contact us at{" "}</text:p>
      <text:p text:style-name="P1"><text:s text:c="14"/>&lt;a</text:p>
      <text:p text:style-name="P1"><text:s text:c="16"/>href="mailto:salesteam@yardieprints.com"</text:p>
      <text:p text:style-name="P1"><text:s text:c="16"/>className="font-medium text-primary underline underline-offset-4"</text:p>
      <text:p text:style-name="P1"><text:s text:c="14"/>&gt;</text:p>
      <text:p text:style-name="P1"><text:s text:c="16"/>salesteam@yardieprints.com</text:p>
      <text:p text:style-name="P1"><text:s text:c="14"/>&lt;/a&gt;</text:p>
      <text:p text:style-name="P1"><text:s text:c="14"/>.</text:p>
      <text:p text:style-name="P1"><text:s text:c="12"/>&lt;/p&gt;</text:p>
      <text:p text:style-name="P1"><text:s text:c="10"/>&lt;/section&gt;</text:p>
      <text:p text:style-name="P1"><text:s text:c="8"/>&lt;/div&gt;</text:p>
      <text:p text:style-name="P1"><text:s text:c="6"/>&lt;/div&gt;</text:p>
      <text:p text:style-name="P1"><text:s text:c="4"/>&lt;/div&gt;</text:p>
      <text:p text:style-name="P1"><text:s text:c="2"/>);</text:p>
      <text:p text:style-name="P1">};</text:p>
      <text:p text:style-name="P1"/>
      <text:p text:style-name="P1">export default PrivacyPolicy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6</meta:generator>
  </office:meta>
</office:document-meta>
</file>